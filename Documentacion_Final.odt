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2C000006E01BD5C2E7.png" manifest:media-type="image/png"/>
  <manifest:file-entry manifest:full-path="Pictures/1000000100000A34000003BE29174824.png" manifest:media-type="image/png"/>
  <manifest:file-entry manifest:full-path="Pictures/1000000100000A34000003BE144B82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705cm" table:align="left"/>
    </style:style>
    <style:style style:name="Tabla1.A" style:family="table-column">
      <style:table-column-properties style:column-width="1.812cm"/>
    </style:style>
    <style:style style:name="Tabla1.B" style:family="table-column">
      <style:table-column-properties style:column-width="3.408cm"/>
    </style:style>
    <style:style style:name="Tabla1.C" style:family="table-column">
      <style:table-column-properties style:column-width="4.48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9.326cm" table:align="left"/>
    </style:style>
    <style:style style:name="Tabla2.A" style:family="table-column">
      <style:table-column-properties style:column-width="3.149cm"/>
    </style:style>
    <style:style style:name="Tabla2.B" style:family="table-column">
      <style:table-column-properties style:column-width="6.17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Heading_20_2">
      <style:text-properties officeooo:paragraph-rsid="000e8bd0"/>
    </style:style>
    <style:style style:name="P26" style:family="paragraph" style:parent-style-name="Text_20_body">
      <style:text-properties officeooo:paragraph-rsid="000e8bd0"/>
    </style:style>
    <style:style style:name="T1" style:family="text">
      <style:text-properties officeooo:rsid="000e8b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DOCUMENTACIÓN FINAL – PROYECTO GEPOINTS</text:h>
      <text:h text:style-name="Heading_20_2" text:outline-level="2">📌 1. INFORMACIÓN GENERAL</text:h>
      <text:p text:style-name="Text_20_body"><text:span text:style-name="Strong_20_Emphasis">Nombre del proyecto:</text:span> GeoPoints<text:line-break/><text:span text:style-name="Strong_20_Emphasis">Tipo:</text:span> Aplicación Web Geoespacial<text:line-break/><text:span text:style-name="Strong_20_Emphasis">Tecnologías utilizadas:</text:span></text:p>
      <text:list text:style-name="L1">
        <text:list-item>
          <text:p text:style-name="P1">Backend: FastAPI (Python) </text:p>
        </text:list-item>
        <text:list-item>
          <text:p text:style-name="P1">Base de datos: PostgreSQL + PostGIS </text:p>
        </text:list-item>
        <text:list-item>
          <text:p text:style-name="P1">Frontend: HTML, JavaScript, Leaflet </text:p>
        </text:list-item>
        <text:list-item>
          <text:p text:style-name="P1">Servidor web: Nginx </text:p>
        </text:list-item>
        <text:list-item>
          <text:p text:style-name="P2">Contenedores: Docker + Docker Compose </text:p>
        </text:list-item>
      </text:list>
      <text:h text:style-name="Heading_20_2" text:outline-level="2"/>
      <text:h text:style-name="Heading_20_2" text:outline-level="2">🎯 2. OBJETIVO DEL PROYECTO</text:h>
      <text:p text:style-name="Text_20_body">Desarrollar una aplicación web que permita:</text:p>
      <text:list text:style-name="L2">
        <text:list-item>
          <text:p text:style-name="P3">Visualizar puntos geográficos en un mapa interactivo </text:p>
        </text:list-item>
        <text:list-item>
          <text:p text:style-name="P3">Gestionar (crear, editar, eliminar) ubicaciones </text:p>
        </text:list-item>
        <text:list-item>
          <text:p text:style-name="P3">Clasificar puntos por categorías </text:p>
        </text:list-item>
        <text:list-item>
          <text:p text:style-name="P4">Almacenar datos geoespaciales usando PostGIS </text:p>
        </text:list-item>
      </text:list>
      <text:h text:style-name="Heading_20_2" text:outline-level="2"/>
      <text:h text:style-name="Heading_20_2" text:outline-level="2">🏗️ 3. ARQUITECTURA DEL SISTEMA</text:h>
      <text:p text:style-name="Text_20_body">El sistema está basado en arquitectura de microservicios utilizando Docker:</text:p>
      <text:section text:style-name="Sect1" text:name="code-block-viewer">
        <text:p text:style-name="P5">[ Usuario ]</text:p>
        <text:p text:style-name="Preformatted_20_Text"><text:s text:c="5"/>↓</text:p>
        <text:p text:style-name="Preformatted_20_Text">[ Nginx (Proxy) ]</text:p>
        <text:p text:style-name="Preformatted_20_Text"><text:s text:c="5"/>↓</text:p>
        <text:p text:style-name="Preformatted_20_Text">[ FastAPI (Backend) ]</text:p>
        <text:p text:style-name="Preformatted_20_Text"><text:s text:c="5"/>↓</text:p>
        <text:p text:style-name="Preformatted_20_Text">[ PostgreSQL + PostGIS ]</text:p>
      </text:section>
      <text:h text:style-name="Heading_20_3" text:outline-level="3">Componentes:</text:h>
      <text:list text:style-name="L3">
        <text:list-item>
          <text:p text:style-name="P6"><text:span text:style-name="Strong_20_Emphasis">Nginx:</text:span> sirve el frontend y redirige peticiones a la API </text:p>
        </text:list-item>
        <text:list-item>
          <text:p text:style-name="P6"><text:span text:style-name="Strong_20_Emphasis">FastAPI:</text:span> lógica del sistema y endpoints REST </text:p>
        </text:list-item>
        <text:list-item>
          <text:p text:style-name="P6"><text:span text:style-name="Strong_20_Emphasis">PostgreSQL/PostGIS:</text:span> almacenamiento de datos geográficos </text:p>
        </text:list-item>
        <text:list-item>
          <text:p text:style-name="P7"><text:span text:style-name="Strong_20_Emphasis">Leaflet:</text:span> visualización del mapa </text:p>
        </text:list-item>
      </text:list>
      <text:h text:style-name="Heading_20_2" text:outline-level="2">🗂️ 4. ESTRUCTURA DEL PROYECTO</text:h>
      <text:section text:style-name="Sect1" text:name="Sección1">
        <text:p text:style-name="P5"><text:bookmark text:name="code-block-viewer"/><text:soft-page-break/>geo-points/</text:p>
        <text:p text:style-name="Preformatted_20_Text">│</text:p>
        <text:p text:style-name="Preformatted_20_Text">├── app/ <text:s text:c="15"/># Backend FastAPI</text:p>
        <text:p text:style-name="Preformatted_20_Text">│ <text:s text:c="2"/>└── main.py</text:p>
        <text:p text:style-name="Preformatted_20_Text">│</text:p>
        <text:p text:style-name="Preformatted_20_Text">├── db/ <text:s text:c="16"/># Scripts SQL</text:p>
        <text:p text:style-name="Preformatted_20_Text">│ <text:s text:c="2"/>└── init.sql</text:p>
        <text:p text:style-name="Preformatted_20_Text">│</text:p>
        <text:p text:style-name="Preformatted_20_Text">├── frontend/ <text:s text:c="10"/># Interfaz web</text:p>
        <text:p text:style-name="Preformatted_20_Text">│ <text:s text:c="2"/>└── index.html</text:p>
        <text:p text:style-name="Preformatted_20_Text">│</text:p>
        <text:p text:style-name="Preformatted_20_Text">├── nginx/ <text:s text:c="13"/># Configuración proxy</text:p>
        <text:p text:style-name="Preformatted_20_Text">│ <text:s text:c="2"/>└── nginx.conf</text:p>
        <text:p text:style-name="Preformatted_20_Text">│</text:p>
        <text:p text:style-name="Preformatted_20_Text">├── docker-compose.yml</text:p>
        <text:p text:style-name="Preformatted_20_Text">└── README.md</text:p>
      </text:section>
      <text:p text:style-name="Horizontal_20_Line"/>
      <text:h text:style-name="Heading_20_2" text:outline-level="2">🗄️ 5. BASE DE DATOS</text:h>
      <text:p text:style-name="Text_20_body">Se utiliza PostgreSQL con extensión PostGIS.</text:p>
      <text:h text:style-name="Heading_20_3" text:outline-level="3">Tabla principal: <text:span text:style-name="Source_20_Text">puntos</text:span></text:h>
      <text:section text:style-name="Sect1" text:name="Sección2">
        <text:p text:style-name="P5"><text:bookmark text:name="code-block-viewer Copia 1"/>CREATE TABLE puntos (</text:p>
        <text:p text:style-name="Preformatted_20_Text"><text:s text:c="4"/>id SERIAL PRIMARY KEY,</text:p>
        <text:p text:style-name="Preformatted_20_Text"><text:s text:c="4"/>nombre VARCHAR(100),</text:p>
        <text:p text:style-name="Preformatted_20_Text"><text:s text:c="4"/>descripcion TEXT,</text:p>
        <text:p text:style-name="Preformatted_20_Text"><text:s text:c="4"/>categoria VARCHAR(50),</text:p>
        <text:p text:style-name="Preformatted_20_Text"><text:s text:c="4"/>geom GEOGRAPHY(Point,4326)</text:p>
        <text:p text:style-name="Preformatted_20_Text">);</text:p>
      </text:section>
      <text:h text:style-name="Heading_20_3" text:outline-level="3">Datos iniciales:</text:h>
      <text:list text:style-name="L4">
        <text:list-item>
          <text:p text:style-name="P8">Parque Central </text:p>
        </text:list-item>
        <text:list-item>
          <text:p text:style-name="P8">Gasolinera </text:p>
        </text:list-item>
        <text:list-item>
          <text:p text:style-name="P8">Museo Nacional </text:p>
        </text:list-item>
        <text:list-item>
          <text:p text:style-name="P8">Restaurante </text:p>
        </text:list-item>
        <text:list-item>
          <text:p text:style-name="P9">Hospital </text:p>
        </text:list-item>
      </text:list>
      <text:h text:style-name="Heading_20_2" text:outline-level="2"/>
      <text:h text:style-name="Heading_20_2" text:outline-level="2">🔌 6. API REST (ENDPOINTS)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Método</text:p>
            </table:table-cell>
            <table:table-cell table:style-name="Tabla1.A1" office:value-type="string">
              <text:p text:style-name="Table_20_Heading">Endpoint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GET</text:p>
          </table:table-cell>
          <table:table-cell table:style-name="Tabla1.A1" office:value-type="string">
            <text:p text:style-name="Table_20_Contents">/puntos</text:p>
          </table:table-cell>
          <table:table-cell table:style-name="Tabla1.A1" office:value-type="string">
            <text:p text:style-name="Table_20_Contents">Obtener todos los puntos</text:p>
          </table:table-cell>
        </table:table-row>
        <table:table-row>
          <table:table-cell table:style-name="Tabla1.A1" office:value-type="string">
            <text:p text:style-name="Table_20_Contents">GET</text:p>
          </table:table-cell>
          <table:table-cell table:style-name="Tabla1.A1" office:value-type="string">
            <text:p text:style-name="Table_20_Contents">/puntos?categoria=</text:p>
          </table:table-cell>
          <table:table-cell table:style-name="Tabla1.A1" office:value-type="string">
            <text:p text:style-name="Table_20_Contents">Filtrar por categoría</text:p>
          </table:table-cell>
        </table:table-row>
        <table:table-row>
          <table:table-cell table:style-name="Tabla1.A1" office:value-type="string">
            <text:p text:style-name="Table_20_Contents">POST</text:p>
          </table:table-cell>
          <table:table-cell table:style-name="Tabla1.A1" office:value-type="string">
            <text:p text:style-name="Table_20_Contents">/puntos</text:p>
          </table:table-cell>
          <table:table-cell table:style-name="Tabla1.A1" office:value-type="string">
            <text:p text:style-name="Table_20_Contents">Crear nuevo punto</text:p>
          </table:table-cell>
        </table:table-row>
        <table:table-row>
          <table:table-cell table:style-name="Tabla1.A1" office:value-type="string">
            <text:p text:style-name="Table_20_Contents">PUT</text:p>
          </table:table-cell>
          <table:table-cell table:style-name="Tabla1.A1" office:value-type="string">
            <text:p text:style-name="Table_20_Contents">/puntos/{id}</text:p>
          </table:table-cell>
          <table:table-cell table:style-name="Tabla1.A1" office:value-type="string">
            <text:p text:style-name="Table_20_Contents">Actualizar punto</text:p>
          </table:table-cell>
        </table:table-row>
        <table:table-row>
          <table:table-cell table:style-name="Tabla1.A1" office:value-type="string">
            <text:p text:style-name="Table_20_Contents">DELETE</text:p>
          </table:table-cell>
          <table:table-cell table:style-name="Tabla1.A1" office:value-type="string">
            <text:p text:style-name="Table_20_Contents">/puntos/{id}</text:p>
          </table:table-cell>
          <table:table-cell table:style-name="Tabla1.A1" office:value-type="string">
            <text:p text:style-name="Table_20_Contents">Eliminar punto</text:p>
          </table:table-cell>
        </table:table-row>
      </table:table>
      <text:h text:style-name="Heading_20_2" text:outline-level="2"><text:soft-page-break/></text:h>
      <text:h text:style-name="Heading_20_2" text:outline-level="2">🗺️ 7. FUNCIONALIDADES</text:h>
      <text:h text:style-name="Heading_20_3" text:outline-level="3">✔ Visualización en mapa</text:h>
      <text:list text:style-name="L5">
        <text:list-item>
          <text:p text:style-name="P10">Uso de Leaflet </text:p>
        </text:list-item>
        <text:list-item>
          <text:p text:style-name="P11">Coordenadas dinámicas </text:p>
        </text:list-item>
      </text:list>
      <text:h text:style-name="Heading_20_3" text:outline-level="3">✔ Crear puntos</text:h>
      <text:list text:style-name="L6">
        <text:list-item>
          <text:p text:style-name="P12">Click en mapa para capturar coordenadas </text:p>
        </text:list-item>
      </text:list>
      <text:h text:style-name="Heading_20_3" text:outline-level="3">✔ Editar puntos</text:h>
      <text:list text:style-name="L7">
        <text:list-item>
          <text:p text:style-name="P13">Formulario dinámico </text:p>
        </text:list-item>
      </text:list>
      <text:h text:style-name="Heading_20_3" text:outline-level="3">✔ Eliminar puntos</text:h>
      <text:list text:style-name="L8">
        <text:list-item>
          <text:p text:style-name="P14">Eliminación directa desde popup </text:p>
        </text:list-item>
      </text:list>
      <text:h text:style-name="Heading_20_3" text:outline-level="3">✔ Filtrar por categoría</text:h>
      <text:list text:style-name="L9">
        <text:list-item>
          <text:p text:style-name="P15">Cultural </text:p>
        </text:list-item>
        <text:list-item>
          <text:p text:style-name="P15">Salud </text:p>
        </text:list-item>
        <text:list-item>
          <text:p text:style-name="P16">Servicio </text:p>
        </text:list-item>
      </text:list>
      <text:h text:style-name="Heading_20_2" text:outline-level="2">⚙️ 8. INSTALACIÓN Y EJECUCIÓN</text:h>
      <text:h text:style-name="Heading_20_3" text:outline-level="3">Requisitos:</text:h>
      <text:list text:style-name="L10">
        <text:list-item>
          <text:p text:style-name="P17">Docker </text:p>
        </text:list-item>
        <text:list-item>
          <text:p text:style-name="P18">Docker Compose </text:p>
        </text:list-item>
      </text:list>
      <text:h text:style-name="Heading_20_3" text:outline-level="3">Pasos:</text:h>
      <text:section text:style-name="Sect1" text:name="Sección3">
        <text:p text:style-name="Preformatted_20_Text">cd geo-points</text:p>
        <text:p text:style-name="Preformatted_20_Text">docker compose up -d --build</text:p>
      </text:section>
      <text:h text:style-name="Heading_20_3" text:outline-level="3">Acceso:</text:h>
      <text:section text:style-name="Sect1" text:name="Sección4">
        <text:p text:style-name="P5"><text:bookmark text:name="code-block-viewer Copia 3"/>http://localhost:8080</text:p>
      </text:section>
      <text:h text:style-name="Heading_20_2" text:outline-level="2"/>
      <text:h text:style-name="Heading_20_2" text:outline-level="2">🧪 9. PRUEBAS REALIZADAS</text:h>
      <text:list text:style-name="L11">
        <text:list-item>
          <text:p text:style-name="P19">✔ Conexión backend ↔ base de datos </text:p>
        </text:list-item>
        <text:list-item>
          <text:p text:style-name="P19">✔ Visualización de puntos </text:p>
        </text:list-item>
        <text:list-item>
          <text:p text:style-name="P19">✔ CRUD completo </text:p>
        </text:list-item>
        <text:list-item>
          <text:p text:style-name="P19">✔ Filtrado por categoría </text:p>
        </text:list-item>
        <text:list-item>
          <text:p text:style-name="P20">✔ Integración con Docker </text:p>
        </text:list-item>
      </text:list>
      <text:h text:style-name="Heading_20_2" text:outline-level="2"><text:soft-page-break/>⚠️ 10. PROBLEMAS Y SOLUCIONES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Problema</text:p>
            </table:table-cell>
            <table:table-cell table:style-name="Tabla2.A1" office:value-type="string">
              <text:p text:style-name="Table_20_Heading">Solución</text:p>
            </table:table-cell>
          </table:table-row>
        </table:table-header-rows>
        <table:table-row>
          <table:table-cell table:style-name="Tabla2.A1" office:value-type="string">
            <text:p text:style-name="Table_20_Contents">Error 404</text:p>
          </table:table-cell>
          <table:table-cell table:style-name="Tabla2.A1" office:value-type="string">
            <text:p text:style-name="Table_20_Contents">Configuración incorrecta de Nginx</text:p>
          </table:table-cell>
        </table:table-row>
        <table:table-row>
          <table:table-cell table:style-name="Tabla2.A1" office:value-type="string">
            <text:p text:style-name="Table_20_Contents">Tabla no existe</text:p>
          </table:table-cell>
          <table:table-cell table:style-name="Tabla2.A1" office:value-type="string">
            <text:p text:style-name="Table_20_Contents">Script init.sql no cargado</text:p>
          </table:table-cell>
        </table:table-row>
        <table:table-row>
          <table:table-cell table:style-name="Tabla2.A1" office:value-type="string">
            <text:p text:style-name="Table_20_Contents">Puerto ocupado</text:p>
          </table:table-cell>
          <table:table-cell table:style-name="Tabla2.A1" office:value-type="string">
            <text:p text:style-name="Table_20_Contents">Cambio a puerto 8080</text:p>
          </table:table-cell>
        </table:table-row>
        <table:table-row>
          <table:table-cell table:style-name="Tabla2.A1" office:value-type="string">
            <text:p text:style-name="Table_20_Contents">No aparece mapa</text:p>
          </table:table-cell>
          <table:table-cell table:style-name="Tabla2.A1" office:value-type="string">
            <text:p text:style-name="Table_20_Contents">Error en fetch API</text:p>
          </table:table-cell>
        </table:table-row>
      </table:table>
      <text:h text:style-name="Heading_20_2" text:outline-level="2"/>
      <text:h text:style-name="Heading_20_2" text:outline-level="2">🚀 11. MEJORAS IMPLEMENTADAS</text:h>
      <text:list text:style-name="L12">
        <text:list-item>
          <text:p text:style-name="P21">Interacción directa con mapa </text:p>
        </text:list-item>
        <text:list-item>
          <text:p text:style-name="P21">Validaciones de formulario </text:p>
        </text:list-item>
        <text:list-item>
          <text:p text:style-name="P21">Feedback visual (alertas) </text:p>
        </text:list-item>
        <text:list-item>
          <text:p text:style-name="P21">CRUD completo </text:p>
        </text:list-item>
        <text:list-item>
          <text:p text:style-name="P22">Arquitectura Dockerizada </text:p>
        </text:list-item>
      </text:list>
      <text:h text:style-name="Heading_20_2" text:outline-level="2"/>
      <text:h text:style-name="Heading_20_2" text:outline-level="2">🌟 12. POSIBLES MEJORAS FUTURAS</text:h>
      <text:list text:style-name="L13">
        <text:list-item>
          <text:p text:style-name="P23">Autenticación de usuarios </text:p>
        </text:list-item>
        <text:list-item>
          <text:p text:style-name="P23">Geolocalización en tiempo real </text:p>
        </text:list-item>
        <text:list-item>
          <text:p text:style-name="P23">Clustering de puntos </text:p>
        </text:list-item>
        <text:list-item>
          <text:p text:style-name="P23">Estilos personalizados de mapa </text:p>
        </text:list-item>
        <text:list-item>
          <text:p text:style-name="P24">Despliegue en la nube (AWS, Render) </text:p>
        </text:list-item>
      </text:list>
      <text:h text:style-name="Heading_20_2" text:outline-level="2"/>
      <text:h text:style-name="Heading_20_2" text:outline-level="2">📚 13. CONCLUSIÓN</text:h>
      <text:p text:style-name="Text_20_body">El sistema desarrollado cumple con los objetivos planteados, permitiendo la gestión eficiente de datos geoespaciales mediante tecnologías modernas. La implementación con Docker facilita su despliegue y escalabilidad.</text:p>
      <text:p text:style-name="Standard"/>
      <text:h text:style-name="P25" text:outline-level="2"><text:soft-page-break/>🚀 1<text:span text:style-name="T1">4</text:span>. <text:span text:style-name="T1">CAPTURAS</text:span></text:h>
      <text:p text:style-name="P26"><draw:frame draw:style-name="fr1" draw:name="Imagen3" text:anchor-type="char" svg:x="0.159cm" svg:y="-0.037cm" svg:width="17cm" svg:height="6.234cm" draw:z-index="2"><draw:image xlink:href="Pictures/1000000100000A34000003BE144B8251.png" xlink:type="simple" xlink:show="embed" xlink:actuate="onLoad" draw:mime-type="image/png"/></draw:frame><draw:frame draw:style-name="fr1" draw:name="Imagen2" text:anchor-type="char" svg:x="0.344cm" svg:y="7.108cm" svg:width="16.249cm" svg:height="5.958cm" draw:z-index="1"><draw:image xlink:href="Pictures/1000000100000A34000003BE29174824.png" xlink:type="simple" xlink:show="embed" xlink:actuate="onLoad" draw:mime-type="image/png"/></draw:frame></text:p>
      <text:p text:style-name="Standard"><draw:frame draw:style-name="fr1" draw:name="Imagen1" text:anchor-type="char" svg:x="0.185cm" svg:y="7.144cm" svg:width="17cm" svg:height="11.49cm" draw:z-index="0"><draw:image xlink:href="Pictures/1000000100000A2C000006E01BD5C2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20:36:29.425144995</meta:creation-date>
    <dc:date>2026-04-23T20:44:43.744881178</dc:date>
    <meta:editing-duration>PT5M54S</meta:editing-duration>
    <meta:editing-cycles>2</meta:editing-cycles>
    <meta:generator>LibreOffice/25.8.5.2$Linux_X86_64 LibreOffice_project/580$Build-2</meta:generator>
    <meta:document-statistic meta:table-count="2" meta:image-count="3" meta:object-count="0" meta:page-count="5" meta:paragraph-count="135" meta:word-count="489" meta:character-count="3145" meta:non-whitespace-character-count="2693"/>
  </office:meta>
</office:document-meta>
</file>